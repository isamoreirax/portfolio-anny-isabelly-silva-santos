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style="italic" style:font-style-asian="italic" style:font-style-complex="italic"/>
    </style:style>
    <style:style style:name="T3" style:parent-style-name="Fonteparág.padrão" style:family="text">
      <style:text-properties fo:font-style="italic" style:font-style-asian="italic" style:font-style-complex="italic"/>
    </style:style>
    <style:style style:name="P4" style:parent-style-name="Normal" style:family="paragraph">
      <style:text-properties fo:language="en" fo:country="US"/>
    </style:style>
    <style:style style:name="T5" style:parent-style-name="Fonteparág.padrão" style:family="text">
      <style:text-properties fo:language="en" fo:country="US"/>
    </style:style>
    <style:style style:name="T6" style:parent-style-name="Fonteparág.padrão" style:family="text">
      <style:text-properties fo:font-style="italic" style:font-style-asian="italic" style:font-style-complex="italic"/>
    </style:style>
    <style:style style:name="T7" style:parent-style-name="Fonteparág.padrão" style:family="text">
      <style:text-properties fo:font-style="italic" style:font-style-asian="italic" style:font-style-complex="italic"/>
    </style:style>
    <style:style style:name="T8" style:parent-style-name="Fonteparág.padrão" style:family="text">
      <style:text-properties fo:language="en" fo:country="US"/>
    </style:style>
    <style:style style:name="T9" style:parent-style-name="Fonteparág.padrão" style:family="text">
      <style:text-properties fo:language="en" fo:country="US"/>
    </style:style>
    <style:style style:name="T10" style:parent-style-name="Fonteparág.padrão" style:family="text">
      <style:text-properties fo:font-style="italic" style:font-style-asian="italic" style:font-style-complex="italic" fo:language="en" fo:country="US"/>
    </style:style>
    <style:style style:name="T11" style:parent-style-name="Fonteparág.padrão" style:family="text">
      <style:text-properties fo:language="en" fo:country="US"/>
    </style:style>
    <style:style style:name="T12" style:parent-style-name="Fonteparág.padrão" style:family="text">
      <style:text-properties fo:font-style="italic" style:font-style-asian="italic" style:font-style-complex="italic"/>
    </style:style>
    <style:style style:name="T13" style:parent-style-name="Fonteparág.padrão" style:family="text">
      <style:text-properties fo:font-style="italic" style:font-style-asian="italic" style:font-style-complex="italic"/>
    </style:style>
    <style:style style:name="T14" style:parent-style-name="Fonteparág.padrão" style:family="text">
      <style:text-properties fo:font-style="italic" style:font-style-asian="italic" style:font-style-complex="italic"/>
    </style:style>
    <style:style style:name="T15" style:parent-style-name="Fonteparág.padrão" style:family="text">
      <style:text-properties fo:font-style="italic" style:font-style-asian="italic" style:font-style-complex="italic"/>
    </style:style>
    <style:style style:name="T16" style:parent-style-name="Fonteparág.padrão" style:family="text">
      <style:text-properties fo:font-style="italic" style:font-style-asian="italic" style:font-style-complex="italic"/>
    </style:style>
    <style:style style:name="T17" style:parent-style-name="Fonteparág.padrão" style:family="text">
      <style:text-properties fo:font-style="italic" style:font-style-asian="italic" style:font-style-complex="italic"/>
    </style:style>
    <style:style style:name="T18" style:parent-style-name="Fonteparág.padrão" style:family="text">
      <style:text-properties fo:font-style="italic" style:font-style-asian="italic" style:font-style-complex="italic"/>
    </style:style>
    <style:style style:name="T19" style:parent-style-name="Fonteparág.padrão" style:family="text">
      <style:text-properties fo:font-style="italic" style:font-style-asian="italic" style:font-style-complex="italic"/>
    </style:style>
    <style:style style:name="T20" style:parent-style-name="Fonteparág.padrão" style:family="text">
      <style:text-properties fo:font-style="italic" style:font-style-asian="italic" style:font-style-complex="italic"/>
    </style:style>
    <style:style style:name="T21" style:parent-style-name="Fonteparág.padrão" style:family="text">
      <style:text-properties fo:font-style="italic" style:font-style-asian="italic" style:font-style-complex="italic"/>
    </style:style>
    <style:style style:name="T22" style:parent-style-name="Fonteparág.padrão" style:family="text">
      <style:text-properties fo:font-style="italic" style:font-style-asian="italic" style:font-style-complex="italic"/>
    </style:style>
    <style:style style:name="T23" style:parent-style-name="Fonteparág.padrão" style:family="text">
      <style:text-properties fo:font-style="italic" style:font-style-asian="italic" style:font-style-complex="italic"/>
    </style:style>
    <style:style style:name="T24" style:parent-style-name="Fonteparág.padrão" style:family="text">
      <style:text-properties fo:font-style="italic" style:font-style-asian="italic" style:font-style-complex="italic"/>
    </style:style>
    <style:style style:name="T25" style:parent-style-name="Fonteparág.padrão" style:family="text">
      <style:text-properties fo:font-style="italic" style:font-style-asian="italic" style:font-style-complex="italic"/>
    </style:style>
    <style:style style:name="P26" style:parent-style-name="Normal" style:family="paragraph">
      <style:text-properties fo:language="en" fo:country="US"/>
    </style:style>
    <style:style style:name="T27" style:parent-style-name="Fonteparág.padrão" style:family="text">
      <style:text-properties fo:language="en" fo:country="US"/>
    </style:style>
    <style:style style:name="T28" style:parent-style-name="Fonteparág.padrão" style:family="text">
      <style:text-properties fo:font-style="italic" style:font-style-asian="italic" style:font-style-complex="italic"/>
    </style:style>
    <style:style style:name="T29" style:parent-style-name="Fonteparág.padrão" style:family="text">
      <style:text-properties fo:language="en" fo:country="US"/>
    </style:style>
    <style:style style:name="T30" style:parent-style-name="Fonteparág.padrão" style:family="text">
      <style:text-properties fo:language="en" fo:country="US"/>
    </style:style>
    <style:style style:name="T31" style:parent-style-name="Fonteparág.padrão" style:family="text">
      <style:text-properties fo:font-style="italic" style:font-style-asian="italic" style:font-style-complex="italic"/>
    </style:style>
    <style:style style:name="T32" style:parent-style-name="Fonteparág.padrão" style:family="text">
      <style:text-properties fo:language="en" fo:country="US"/>
    </style:style>
    <style:style style:name="T33" style:parent-style-name="Fonteparág.padrão" style:family="text">
      <style:text-properties fo:language="en" fo:country="US"/>
    </style:style>
    <style:style style:name="T34" style:parent-style-name="Fonteparág.padrão" style:family="text">
      <style:text-properties fo:font-style="italic" style:font-style-asian="italic" style:font-style-complex="italic"/>
    </style:style>
    <style:style style:name="T35" style:parent-style-name="Fonteparág.padrão" style:family="text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T38" style:parent-style-name="Fonteparág.padrão" style:family="text">
      <style:text-properties fo:language="en" fo:country="US"/>
    </style:style>
    <style:style style:name="T39" style:parent-style-name="Fonteparág.padrão" style:family="text">
      <style:text-properties fo:font-style="italic" style:font-style-asian="italic" style:font-style-complex="italic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</office:automatic-styles>
  <office:body>
    <office:text text:use-soft-page-breaks="true">
      <text:p text:style-name="P1"><text:span text:style-name="T2"># Desafio 1 — Filtro de sombra nos pixels amarelos</text:span></text:p>
      <text:p text:style-name="Normal"/>
      <text:p text:style-name="Normal">emoji_data = {</text:p>
      <text:p text:style-name="Normal">    "nome": "Smile",</text:p>
      <text:p text:style-name="Normal">    "grade": [</text:p>
      <text:p text:style-name="Normal">        [(255,255,0), (255,255,0), (255,255,0), (255,255,0), (255,255,0)],</text:p>
      <text:p text:style-name="Normal">        [(255,255,0), (0,0,0),     (255,255,0), (0,0,0),     (255,255,0)],</text:p>
      <text:p text:style-name="Normal">        [(255,255,0), (255,255,0), (255,255,0), (255,255,0), (255,255,0)],</text:p>
      <text:p text:style-name="Normal">        [(255,255,0), (0,0,0),     (0,0,0),     (0,0,0),     (255,255,0)],</text:p>
      <text:p text:style-name="Normal">        [(255,255,0), (255,255,0), (255,255,0), (255,255,0), (255,255,0)],</text:p>
      <text:p text:style-name="Normal">    ]</text:p>
      <text:p text:style-name="Normal">}</text:p>
      <text:p text:style-name="Normal"/>
      <text:p text:style-name="Normal">nova_grade = []</text:p>
      <text:p text:style-name="Normal"/>
      <text:p text:style-name="Normal"><text:span text:style-name="T3"># Nível 1 — percorre o dicionário</text:span></text:p>
      <text:p text:style-name="P4">for chave, valor in emoji_data.items():</text:p>
      <text:p text:style-name="Normal"><text:span text:style-name="T5">    </text:span>if chave == "grade":</text:p>
      <text:p text:style-name="Normal">        <text:span text:style-name="T6"># Nível 2 — percorre as linhas da grade</text:span></text:p>
      <text:p text:style-name="Normal">        for linha in valor:</text:p>
      <text:p text:style-name="Normal">            nova_linha = []</text:p>
      <text:p text:style-name="Normal">            <text:span text:style-name="T7"># Nível 3 — percorre cada pixel (tupla) da linha</text:span></text:p>
      <text:p text:style-name="Normal">            <text:span text:style-name="T8">for pixel in linha:</text:span></text:p>
      <text:p text:style-name="Normal"><text:span text:style-name="T9">                if pixel == (255, 255, 0):  </text:span><text:span text:style-name="T10"># pixel amarelo?</text:span></text:p>
      <text:p text:style-name="Normal"><text:span text:style-name="T11">                    </text:span><text:span text:style-name="T12"># Tupla é imutável → cria nova tupla com brilho reduzido</text:span></text:p>
      <text:p text:style-name="Normal">                    pixel_escuro = tuple(v // 2 for v in pixel)</text:p>
      <text:p text:style-name="Normal">                    nova_linha.append(pixel_escuro)</text:p>
      <text:p text:style-name="Normal">                else:</text:p>
      <text:soft-page-break/>
      <text:p text:style-name="Normal">                    nova_linha.append(pixel)  <text:span text:style-name="T13"># preto permanece igual</text:span></text:p>
      <text:p text:style-name="Normal">            nova_grade.append(nova_linha)</text:p>
      <text:p text:style-name="Normal"/>
      <text:p text:style-name="Normal">emoji_data["grade"] = nova_grade</text:p>
      <text:p text:style-name="Normal">print("Grade atualizada:", emoji_data["grade"])</text:p>
      <text:p text:style-name="Normal"/>
      <text:p text:style-name="Normal"/>
      <text:p text:style-name="Normal"/>
      <text:p text:style-name="Normal"/>
      <text:p text:style-name="Normal"><text:span text:style-name="T14"># Desafio 2 — Transposição de matrizes musicais</text:span></text:p>
      <text:p text:style-name="Normal"/>
      <text:p text:style-name="Normal">biblioteca_musical = {</text:p>
      <text:p text:style-name="Normal">    "Toques": [</text:p>
      <text:p text:style-name="Normal">        {"Alegre": ([440, 480], [520, 560])},</text:p>
      <text:p text:style-name="Normal">        {"Triste": ([200, 150], [100, 50])}</text:p>
      <text:p text:style-name="Normal">    ]</text:p>
      <text:p text:style-name="Normal">}</text:p>
      <text:p text:style-name="Normal"/>
      <text:p text:style-name="Normal"><text:span text:style-name="T15"># Nível 1 — percorre os itens do dicionário raiz</text:span></text:p>
      <text:p text:style-name="Normal">for categoria, lista_toques in biblioteca_musical.items():</text:p>
      <text:p text:style-name="Normal">    <text:span text:style-name="T16"># Nível 2 — percorre cada toque (dicionário) na lista</text:span></text:p>
      <text:p text:style-name="Normal">    for toque in lista_toques:</text:p>
      <text:p text:style-name="Normal">        for nome, matriz in toque.items():</text:p>
      <text:p text:style-name="Normal">            <text:span text:style-name="T17"># Nível 3 — constrói a transposta</text:span></text:p>
      <text:p text:style-name="Normal">            <text:span text:style-name="T18"># zip(*matriz) agrupa os elementos por coluna</text:span></text:p>
      <text:p text:style-name="Normal">            transposta = [list(col) for col in zip(*matriz)]</text:p>
      <text:p text:style-name="Normal">            <text:span text:style-name="T19"># .update() substitui o valor do toque pela transposta</text:span></text:p>
      <text:p text:style-name="Normal">            toque.update({nome: transposta})</text:p>
      <text:p text:style-name="Normal"/>
      <text:p text:style-name="Normal">print(biblioteca_musical)</text:p>
      <text:p text:style-name="Normal"/>
      <text:p text:style-name="Normal"/>
      <text:p text:style-name="Normal"><text:span text:style-name="T20"># Desafio 3 — Playlist de Imagens (integrador)</text:span></text:p>
      <text:p text:style-name="Normal"><text:span text:style-name="T21"># Estrutura mistura: 1 dicionário raiz, 1 lista de álbuns, tuplas de pixels</text:span></text:p>
      <text:p text:style-name="Normal"/>
      <text:p text:style-name="Normal">playlist_imagens = {</text:p>
      <text:p text:style-name="Normal">    "titulo": "Galeria de Emojis",</text:p>
      <text:p text:style-name="Normal">    "albuns": [                        <text:span text:style-name="T22"># Lista de álbuns</text:span></text:p>
      <text:p text:style-name="Normal">        {</text:p>
      <text:p text:style-name="Normal">            "nome": "Emojis Alegres",</text:p>
      <text:p text:style-name="Normal">            "filtro": "brilho",</text:p>
      <text:p text:style-name="Normal">            "frames": [            <text:span text:style-name="T23"># Lista de frames (grade de tuplas)</text:span></text:p>
      <text:p text:style-name="Normal">                [(255,255,0), (0,0,0)],</text:p>
      <text:p text:style-name="Normal">                [(0,0,0),     (255,255,0)]</text:p>
      <text:p text:style-name="Normal">            ]</text:p>
      <text:p text:style-name="Normal">        },</text:p>
      <text:p text:style-name="Normal">        {</text:p>
      <text:p text:style-name="Normal">            "nome": "Emojis Tristes",</text:p>
      <text:p text:style-name="Normal">            "filtro": "sombra",</text:p>
      <text:p text:style-name="Normal">            "frames": [</text:p>
      <text:p text:style-name="Normal">                [(100,100,255), (0,0,0)],</text:p>
      <text:p text:style-name="Normal">                [(0,0,0),       (100,100,255)]</text:p>
      <text:p text:style-name="Normal">            ]</text:p>
      <text:p text:style-name="Normal">        }</text:p>
      <text:p text:style-name="Normal">    ]</text:p>
      <text:p text:style-name="Normal">}</text:p>
      <text:p text:style-name="Normal"/>
      <text:p text:style-name="Normal"><text:span text:style-name="T24"># Insere um álbum bônus no início com .insert()</text:span></text:p>
      <text:p text:style-name="Normal">playlist_imagens["albuns"].insert(0, {</text:p>
      <text:p text:style-name="Normal">    "nome": "Bônus", "filtro": "nenhum",</text:p>
      <text:p text:style-name="Normal">    "frames": [[(255,0,0)]]</text:p>
      <text:p text:style-name="Normal">})</text:p>
      <text:p text:style-name="Normal"/>
      <text:p text:style-name="Normal">resultado = {}</text:p>
      <text:p text:style-name="Normal"/>
      <text:p text:style-name="Normal"><text:span text:style-name="T25"># Nível 1 — chaves do dicionário raiz com .keys()</text:span></text:p>
      <text:p text:style-name="P26">for chave in playlist_imagens.keys():</text:p>
      <text:p text:style-name="Normal"><text:span text:style-name="T27">    </text:span>if chave == "albuns":</text:p>
      <text:p text:style-name="Normal">        <text:span text:style-name="T28"># Nível 2 — percorre os álbuns da lista</text:span></text:p>
      <text:p text:style-name="Normal">        <text:span text:style-name="T29">for album in playlist_imagens[chave]:</text:span></text:p>
      <text:p text:style-name="Normal"><text:span text:style-name="T30">            </text:span>frames_processados = []</text:p>
      <text:p text:style-name="Normal">            <text:span text:style-name="T31"># Nível 3 — percorre cada frame (linha de pixels)</text:span></text:p>
      <text:p text:style-name="Normal">            <text:span text:style-name="T32">for frame in album["frames"]:</text:span></text:p>
      <text:p text:style-name="Normal"><text:span text:style-name="T33">                </text:span>nova_linha = []</text:p>
      <text:p text:style-name="Normal">                for pixel in frame:</text:p>
      <text:p text:style-name="Normal">                    if album["filtro"] == "sombra":</text:p>
      <text:p text:style-name="Normal">                        <text:span text:style-name="T34"># Tupla imutável → cria nova via gerador</text:span></text:p>
      <text:p text:style-name="Normal">                        <text:span text:style-name="T35">pixel = tuple(v // 2 for v in pixel)</text:span></text:p>
      <text:p text:style-name="P36">                    elif album["filtro"] == "brilho":</text:p>
      <text:p text:style-name="P37">                        pixel = tuple(min(255, v + 30) for v in pixel)</text:p>
      <text:p text:style-name="Normal"><text:span text:style-name="T38">                    </text:span>nova_linha.append(pixel)</text:p>
      <text:p text:style-name="Normal">                frames_processados.append(nova_linha)</text:p>
      <text:p text:style-name="Normal">            resultado[album["nome"]] = frames_processados</text:p>
      <text:p text:style-name="Normal"/>
      <text:soft-page-break/>
      <text:p text:style-name="Normal"><text:span text:style-name="T39"># Remove o álbum bônus com .pop()</text:span></text:p>
      <text:p text:style-name="Normal">playlist_imagens["albuns"].pop(0)</text:p>
      <text:p text:style-name="Normal"/>
      <text:p text:style-name="Normal">print("Resultado:", resultado)</text:p>
      <text:p text:style-name="P40">print("Playlist final:", playlist_imagens)</text:p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NY ISABELLY SILVA SANTOS</meta:initial-creator>
    <dc:creator>ANNY ISABELLY SILVA SANTOS</dc:creator>
    <meta:creation-date>2026-05-14T23:30:00Z</meta:creation-date>
    <dc:date>2026-05-14T23:31:00Z</dc:date>
    <meta:template xlink:href="Normal" xlink:type="simple"/>
    <meta:editing-cycles>1</meta:editing-cycles>
    <meta:editing-duration>PT60S</meta:editing-duration>
    <meta:user-defined meta:name="MSIP_Label_defa4170-0d19-0005-0004-bc88714345d2_Enabled">true</meta:user-defined>
    <meta:user-defined meta:name="MSIP_Label_defa4170-0d19-0005-0004-bc88714345d2_SetDate">2026-05-14T23:31:16Z</meta:user-defined>
    <meta:user-defined meta:name="MSIP_Label_defa4170-0d19-0005-0004-bc88714345d2_Method">Standard</meta:user-defined>
    <meta:user-defined meta:name="MSIP_Label_defa4170-0d19-0005-0004-bc88714345d2_Name">defa4170-0d19-0005-0004-bc88714345d2</meta:user-defined>
    <meta:user-defined meta:name="MSIP_Label_defa4170-0d19-0005-0004-bc88714345d2_SiteId">38ae2f02-5710-4e12-80bb-83600c3fdf1e</meta:user-defined>
    <meta:user-defined meta:name="MSIP_Label_defa4170-0d19-0005-0004-bc88714345d2_ActionId">72dbf542-9b08-4c2d-9cfd-710ff9ffd551</meta:user-defined>
    <meta:user-defined meta:name="MSIP_Label_defa4170-0d19-0005-0004-bc88714345d2_ContentBits">0</meta:user-defined>
    <meta:user-defined meta:name="MSIP_Label_defa4170-0d19-0005-0004-bc88714345d2_Tag">10, 3, 0, 1</meta:user-defined>
    <meta:document-statistic meta:page-count="5" meta:paragraph-count="98" meta:word-count="581" meta:character-count="3828" meta:row-count="145" meta:non-whitespace-character-count="3345"/>
  </office:meta>
</office:document-meta>
</file>