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Fonteparág.padrão" style:family="text">
      <style:text-properties fo:language="en" fo:country="US"/>
    </style:style>
    <style:style style:name="T7" style:parent-style-name="Fonteparág.padrão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Fonteparág.padrão" style:family="text">
      <style:text-properties fo:language="en" fo:country="US"/>
    </style:style>
    <style:style style:name="T11" style:parent-style-name="Fonteparág.padrão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Fonteparág.padrão" style:family="text">
      <style:text-properties fo:language="en" fo:country="US"/>
    </style:style>
    <style:style style:name="T23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------------ parte 1</text:p>
      <text:p text:style-name="Normal"/>
      <text:p text:style-name="Normal">def calcular_conforto(temp, umidade, iqa):</text:p>
      <text:p text:style-name="Normal">  # Penalização de temperatura (ideal: 20 a 26°C)</text:p>
      <text:p text:style-name="Normal">  <text:span text:style-name="T2">if temp &lt; 20:</text:span></text:p>
      <text:p text:style-name="P3">    penal_temp = (20 - temp) * 0.3</text:p>
      <text:p text:style-name="P4">  elif temp &gt; 26:</text:p>
      <text:p text:style-name="P5">    penal_temp = (temp - 26) * 0.3</text:p>
      <text:p text:style-name="Normal"><text:span text:style-name="T6">  </text:span>else:</text:p>
      <text:p text:style-name="Normal">    penal_temp = 0</text:p>
      <text:p text:style-name="Normal"/>
      <text:p text:style-name="Normal">  # Umidade ideal (40 a 70%)</text:p>
      <text:p text:style-name="Normal">  if umidade &lt; 40:</text:p>
      <text:p text:style-name="Normal">    penal_umidade = (40 - umidade) * 0.1</text:p>
      <text:p text:style-name="Normal">  elif umidade &gt; 70:</text:p>
      <text:p text:style-name="Normal">    penal_umidade = (umidade - 70) * 0.1</text:p>
      <text:p text:style-name="Normal">  else:</text:p>
      <text:p text:style-name="Normal">    penal_umidade = 0</text:p>
      <text:p text:style-name="Normal"/>
      <text:p text:style-name="Normal">  # Penalização do IQA (padrão Brasil)</text:p>
      <text:p text:style-name="Normal">  <text:span text:style-name="T7">if iqa &lt;= 50:</text:span></text:p>
      <text:p text:style-name="P8">    penal_iqa = 0</text:p>
      <text:p text:style-name="P9">  elif iqa &lt;= 100:</text:p>
      <text:p text:style-name="Normal"><text:span text:style-name="T10">    </text:span>penal_iqa = 1</text:p>
      <text:p text:style-name="Normal">  elif iqa &lt;= 150:</text:p>
      <text:p text:style-name="Normal">    penal_iqa = 2</text:p>
      <text:p text:style-name="Normal">  else:</text:p>
      <text:p text:style-name="Normal">    penal_iqa = 3</text:p>
      <text:p text:style-name="Normal"/>
      <text:p text:style-name="Normal">  nota = 10 - (penal_temp + penal_umidade + penal_iqa)</text:p>
      <text:p text:style-name="Normal">  <text:span text:style-name="T11">return max(0, min(10, nota))</text:span></text:p>
      <text:p text:style-name="P12"/>
      <text:p text:style-name="P13"/>
      <text:p text:style-name="P14">def classificar_iqa(iqa):</text:p>
      <text:p text:style-name="P15">  match iqa:</text:p>
      <text:p text:style-name="P16">    case iqa if iqa &lt;= 50:</text:p>
      <text:p text:style-name="P17">      return "Boa"</text:p>
      <text:p text:style-name="P18">    case iqa if iqa &lt;= 100:</text:p>
      <text:p text:style-name="P19">      return "Moderada"</text:p>
      <text:p text:style-name="P20">    case iqa if iqa &lt;= 150:</text:p>
      <text:p text:style-name="P21">      return "Ruim"</text:p>
      <text:p text:style-name="Normal"><text:span text:style-name="T22">    </text:span>case _:</text:p>
      <text:p text:style-name="Normal">      return "Muito Ruim"</text:p>
      <text:p text:style-name="Normal"/>
      <text:p text:style-name="Normal"/>
      <text:p text:style-name="Normal">def analisar_microclima():</text:p>
      <text:p text:style-name="Normal">  # Dados simulados com base em São Paulo</text:p>
      <text:p text:style-name="Normal">  dados_locais = [</text:p>
      <text:p text:style-name="Normal">    ["Praça Arborizada (manhã)", 22, 85, 30],</text:p>
      <text:p text:style-name="Normal">    ["Praça Arborizada (tarde)", 25, 65, 45],</text:p>
      <text:p text:style-name="Normal"/>
      <text:p text:style-name="Normal">    ["Avenida Movimentada (manhã)", 24, 80, 55],</text:p>
      <text:p text:style-name="Normal">    ["Avenida Movimentada (tarde)", 28, 60, 95],</text:p>
      <text:p text:style-name="Normal"/>
      <text:p text:style-name="Normal">    ["Ponto de Ônibus sem cobertura (manhã)", 23, 82, 50],</text:p>
      <text:p text:style-name="Normal">    ["Ponto de Ônibus sem cobertura (tarde)", 30, 55, 110]</text:p>
      <text:soft-page-break/>
      <text:p text:style-name="Normal">  ]</text:p>
      <text:p text:style-name="Normal"/>
      <text:p text:style-name="Normal">  for local in dados_locais:</text:p>
      <text:p text:style-name="Normal">    nome = local[0]</text:p>
      <text:p text:style-name="Normal">    metricas = local[1:]</text:p>
      <text:p text:style-name="Normal"/>
      <text:p text:style-name="Normal">    print(f"\nLocal: {nome}")</text:p>
      <text:p text:style-name="Normal"/>
      <text:p text:style-name="Normal">    for i, valor in enumerate(metricas):</text:p>
      <text:p text:style-name="Normal">      if i == 0:</text:p>
      <text:p text:style-name="Normal">        print(f"Temperatura: {valor}°C")</text:p>
      <text:p text:style-name="Normal">      elif i == 1:</text:p>
      <text:p text:style-name="Normal">        print(f"Umidade: {valor}%")</text:p>
      <text:p text:style-name="Normal">      elif i == 2:</text:p>
      <text:p text:style-name="Normal">        classificacao = classificar_iqa(valor)</text:p>
      <text:p text:style-name="Normal">        print(f"IQA: {valor} ({classificacao})")</text:p>
      <text:p text:style-name="Normal"/>
      <text:p text:style-name="Normal">    conforto = calcular_conforto(metricas[0], metricas[1], metricas[2])</text:p>
      <text:p text:style-name="Normal">    print(f"Nota de Conforto Urbano: {conforto:.2f}")</text:p>
      <text:p text:style-name="Normal"/>
      <text:p text:style-name="Normal"/>
      <text:p text:style-name="Normal">analisar_microclima()</text:p>
      <text:p text:style-name="Normal"/>
      <text:p text:style-name="Normal"/>
      <text:p text:style-name="Normal"/>
      <text:p text:style-name="Normal"/>
      <text:p text:style-name="Normal">--------------------- parte 2</text:p>
      <text:p text:style-name="Normal"/>
      <text:soft-page-break/>
      <text:p text:style-name="Normal">def simulador_evasao():</text:p>
      <text:p text:style-name="Normal">  locais = [</text:p>
      <text:p text:style-name="Normal">    "Quarto",</text:p>
      <text:p text:style-name="Normal">    "Corredor",</text:p>
      <text:p text:style-name="Normal">    "Sala",</text:p>
      <text:p text:style-name="Normal">    "Cozinha",</text:p>
      <text:p text:style-name="Normal">    "Porta de saída"</text:p>
      <text:p text:style-name="Normal">  ]</text:p>
      <text:p text:style-name="Normal"/>
      <text:p text:style-name="Normal">  estados = [</text:p>
      <text:p text:style-name="Normal">    "chave",       # quarto tem chave</text:p>
      <text:p text:style-name="Normal">    "escuro",       # corredor escuro</text:p>
      <text:p text:style-name="Normal">    "porta trancada",   # sala</text:p>
      <text:p text:style-name="Normal">    "fogo",        # cozinha</text:p>
      <text:p text:style-name="Normal">    "saida"</text:p>
      <text:p text:style-name="Normal">  ]</text:p>
      <text:p text:style-name="Normal"/>
      <text:p text:style-name="Normal">  posicao = 0</text:p>
      <text:p text:style-name="Normal">  energia = 10</text:p>
      <text:p text:style-name="Normal">  inventario = []</text:p>
      <text:p text:style-name="Normal"/>
      <text:p text:style-name="Normal">  while energia &gt; 0:</text:p>
      <text:p text:style-name="Normal">    local = locais[posicao]</text:p>
      <text:p text:style-name="Normal">    estado = estados[posicao]</text:p>
      <text:p text:style-name="Normal"/>
      <text:p text:style-name="Normal">    print(f"\nVocê está em: {local}")</text:p>
      <text:p text:style-name="Normal">    print(f"Situação: {estado}")</text:p>
      <text:p text:style-name="Normal"/>
      <text:soft-page-break/>
      <text:p text:style-name="Normal">    if estado == "chave":</text:p>
      <text:p text:style-name="Normal">      print("Você encontrou uma chave.")</text:p>
      <text:p text:style-name="Normal">      inventario.append("chave")</text:p>
      <text:p text:style-name="Normal">      posicao += 1</text:p>
      <text:p text:style-name="Normal"/>
      <text:p text:style-name="Normal">    elif estado == "escuro":</text:p>
      <text:p text:style-name="Normal">      print("Está escuro, mas você consegue passar com cuidado.")</text:p>
      <text:p text:style-name="Normal">      posicao += 1</text:p>
      <text:p text:style-name="Normal"/>
      <text:p text:style-name="Normal">    elif estado == "porta trancada":</text:p>
      <text:p text:style-name="Normal">      if "chave" in inventario:</text:p>
      <text:p text:style-name="Normal">        print("Você abriu a porta com a chave.")</text:p>
      <text:p text:style-name="Normal">        posicao += 1</text:p>
      <text:p text:style-name="Normal">      else:</text:p>
      <text:p text:style-name="Normal">        print("Porta trancada! Voltando...")</text:p>
      <text:p text:style-name="Normal">        posicao -= 1</text:p>
      <text:p text:style-name="Normal"/>
      <text:p text:style-name="Normal">    elif estado == "fogo":</text:p>
      <text:p text:style-name="Normal">      print("Há fogo! Caminho bloqueado.")</text:p>
      <text:p text:style-name="Normal">      posicao -= 1</text:p>
      <text:p text:style-name="Normal"/>
      <text:p text:style-name="Normal">    elif estado == "saida":</text:p>
      <text:p text:style-name="Normal">      print("Você conseguiu sair com segurança!")</text:p>
      <text:p text:style-name="Normal">      break</text:p>
      <text:p text:style-name="Normal"/>
      <text:p text:style-name="Normal">    energia -= 1</text:p>
      <text:p text:style-name="Normal"/>
      <text:p text:style-name="Normal">    if posicao &lt; 0:</text:p>
      <text:soft-page-break/>
      <text:p text:style-name="Normal">      posicao = 0</text:p>
      <text:p text:style-name="Normal"/>
      <text:p text:style-name="Normal">  if energia == 0:</text:p>
      <text:p text:style-name="Normal">    print("Você ficou sem energia e não conseguiu sair.")</text:p>
      <text:p text:style-name="Normal"/>
      <text:p text:style-name="Normal"/>
      <text:p text:style-name="Normal">simulador_evasao()</text:p>
      <text:p text:style-name="Normal"/>
      <text:p text:style-name="Normal">----------------------- reflexão</text:p>
      <text:p text:style-name="Normal"/>
      <text:p text:style-name="Normal"/>
      <text:p text:style-name="Normal">Parágrafo 1<text:span text:style-name="T23">:</text:span><text:s/>Durante o mapeamento físico da minha casa, percebi que um ambiente comum, que eu já conhecia bem, se tornou muito mais complexo quando precisei analisá-lo de forma lógica. Cada espaço deixou de ser apenas um cômodo e passou a representar uma etapa com características específicas, como obstáculos e possibilidades. Isso me fez enxergar que o mundo real possui muitas variáveis que normalmente ignoramos, mas que fazem diferença na tomada de decisão.</text:p>
      <text:p text:style-name="Normal"/>
      <text:p text:style-name="Normal">Parágrafo 2: Ao transformar portas, corredores e obstáculos em variáveis lógicas, o maior desafio foi simplificar a realidade sem perder o sentido das situações. Por exemplo, uma porta trancada não é apenas um problema isolado, mas depende de uma condição anterior, como ter encontrado uma chave. Isso me mostrou que muitas decisões no mundo real são encadeadas, exigindo análise de causa e consequência, assim como acontece nas estruturas condicionais da programação.</text:p>
      <text:p text:style-name="Normal"/>
      <text:p text:style-name="Normal">Parágrafo 3: Essa atividade me fez refletir que aprender programação muda a forma como eu penso no dia a dia. Passei a dividir problemas grandes em partes menores, analisar possibilidades e prever resultados antes de agir. Isso ajuda não só em tarefas acadêmicas, mas também em situações práticas, como organizar meu tempo, resolver imprevistos e tomar decisões mais racionais e eficient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NY ISABELLY SILVA SANTOS</meta:initial-creator>
    <dc:creator>ANNY ISABELLY SILVA SANTOS</dc:creator>
    <meta:creation-date>2026-05-14T23:29:00Z</meta:creation-date>
    <dc:date>2026-05-14T23:30:00Z</dc:date>
    <meta:template xlink:href="Normal" xlink:type="simple"/>
    <meta:editing-cycles>1</meta:editing-cycles>
    <meta:editing-duration>PT60S</meta:editing-duration>
    <meta:user-defined meta:name="MSIP_Label_defa4170-0d19-0005-0004-bc88714345d2_Enabled">true</meta:user-defined>
    <meta:user-defined meta:name="MSIP_Label_defa4170-0d19-0005-0004-bc88714345d2_SetDate">2026-05-14T23:30:19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38ae2f02-5710-4e12-80bb-83600c3fdf1e</meta:user-defined>
    <meta:user-defined meta:name="MSIP_Label_defa4170-0d19-0005-0004-bc88714345d2_ActionId">824b50ff-0f84-44f4-ab4d-3eb19964ac6e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6" meta:paragraph-count="112" meta:word-count="669" meta:character-count="4406" meta:row-count="167" meta:non-whitespace-character-count="3849"/>
  </office:meta>
</office:document-meta>
</file>