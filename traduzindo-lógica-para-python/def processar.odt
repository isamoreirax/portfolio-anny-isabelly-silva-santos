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Fonteparág.padrão" style:family="text">
      <style:text-properties fo:language="en" fo:country="US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T10" style:parent-style-name="Fonteparág.padrão" style:family="text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Fonteparág.padrão" style:family="text">
      <style:text-properties fo:language="en" fo:country="US"/>
    </style:style>
    <style:style style:name="T14" style:parent-style-name="Fonteparág.padrão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Fonteparág.padrão" style:family="text">
      <style:text-properties fo:language="en" fo:country="US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T19" style:parent-style-name="Fonteparág.padrão" style:family="text">
      <style:text-properties fo:language="en" fo:country="US"/>
    </style:style>
    <style:style style:name="T20" style:parent-style-name="Fonteparág.padrão" style:family="text">
      <style:text-properties fo:language="en" fo:country="US"/>
    </style:style>
    <style:style style:name="T21" style:parent-style-name="Fonteparág.padrão" style:family="text">
      <style:text-properties fo:language="en" fo:country="US"/>
    </style:style>
    <style:style style:name="T22" style:parent-style-name="Fonteparág.padrão" style:family="text">
      <style:text-properties fo:language="en" fo:country="US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T24" style:parent-style-name="Fonteparág.padrão" style:family="text">
      <style:text-properties fo:font-weight="bold" style:font-weight-asian="bold" style:font-weight-complex="bold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T26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ef<text:s/><text:span text:style-name="T2">processar_vendas</text:span>():</text:p>
      <text:p text:style-name="Normal">  total_compra = 0.0</text:p>
      <text:p text:style-name="Normal">  itens_comprados = 0</text:p>
      <text:p text:style-name="Normal"/>
      <text:p text:style-name="Normal">  quantidade_tipos = int(input("Quantos produtos diferentes foram comprados? "))</text:p>
      <text:p text:style-name="Normal"/>
      <text:p text:style-name="Normal">  for i in range(1, quantidade_tipos + 1):</text:p>
      <text:p text:style-name="Normal">    nome = input("Nome do produto: ")</text:p>
      <text:p text:style-name="Normal">    preco = float(input("Preço unitário: "))</text:p>
      <text:p text:style-name="Normal">    qtd = int(input("Quantidade deste produto: "))</text:p>
      <text:p text:style-name="Normal"/>
      <text:p text:style-name="Normal">    if preco &lt;= 0 or qtd &lt;= 0:</text:p>
      <text:p text:style-name="Normal">      print(f"Erro: Valores inválidos para {nome}")</text:p>
      <text:p text:style-name="Normal">    else:</text:p>
      <text:p text:style-name="Normal">      subtotal = preco * qtd</text:p>
      <text:p text:style-name="Normal">      total_compra += subtotal</text:p>
      <text:p text:style-name="Normal">      itens_comprados += qtd</text:p>
      <text:p text:style-name="Normal"/>
      <text:p text:style-name="Normal">  if total_compra &gt; 500.00:</text:p>
      <text:p text:style-name="Normal">    total_final = total_compra * 0.90</text:p>
      <text:p text:style-name="Normal">    print("Desconto de 10% aplicado!")</text:p>
      <text:p text:style-name="Normal">  elif total_compra &gt; 200.00:</text:p>
      <text:p text:style-name="Normal">    total_final = total_compra * 0.95</text:p>
      <text:p text:style-name="Normal">  else:</text:p>
      <text:p text:style-name="Normal">    total_final = total_compra</text:p>
      <text:p text:style-name="Normal"/>
      <text:p text:style-name="Normal">  print(f"Resumo: {itens_comprados} itens. Total a pagar: R${total_final:.2f}")</text:p>
      <text:p text:style-name="Normal"/>
      <text:soft-page-break/>
      <text:p text:style-name="Normal">processar_vendas(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def<text:s/><text:span text:style-name="T3">analisar_clima</text:span>():</text:p>
      <text:p text:style-name="Normal">  soma_temperaturas = 0.0</text:p>
      <text:p text:style-name="Normal">  dias_quentes = 0</text:p>
      <text:p text:style-name="Normal">  alerta_extremo = False</text:p>
      <text:p text:style-name="Normal"/>
      <text:p text:style-name="Normal">  for dia in range(1, 8):</text:p>
      <text:p text:style-name="Normal">    temp = float(input(f"Digite a temperatura do dia {dia}: "))</text:p>
      <text:p text:style-name="Normal">    soma_temperaturas += temp</text:p>
      <text:p text:style-name="Normal"/>
      <text:p text:style-name="Normal">    <text:span text:style-name="T4">if temp &gt; 35.0:</text:span></text:p>
      <text:p text:style-name="P5">      dias_quentes += 1</text:p>
      <text:p text:style-name="P6"/>
      <text:p text:style-name="P7">    if temp &gt; 45.0 or temp &lt; -5.0:</text:p>
      <text:p text:style-name="Normal"><text:span text:style-name="T8">      </text:span>alerta_extremo = True</text:p>
      <text:p text:style-name="Normal"/>
      <text:p text:style-name="Normal">  media = soma_temperaturas / 7</text:p>
      <text:p text:style-name="Normal">  print(f"Média semanal: {media:.2f}")</text:p>
      <text:p text:style-name="Normal">  print(f"Dias acima de 35°C: {dias_quentes}")</text:p>
      <text:p text:style-name="Normal"/>
      <text:p text:style-name="Normal">  if alerta_extremo:</text:p>
      <text:p text:style-name="Normal">    print("CUIDADO: Condições climáticas perigosas detectadas!")</text:p>
      <text:soft-page-break/>
      <text:p text:style-name="Normal">  else:</text:p>
      <text:p text:style-name="Normal">    print("Clima dentro da normalidade operacional.")</text:p>
      <text:p text:style-name="Normal"/>
      <text:p text:style-name="Normal">analisar_clima()</text:p>
      <text:p text:style-name="Normal"/>
      <text:p text:style-name="Normal"/>
      <text:p text:style-name="Normal"/>
      <text:p text:style-name="Normal">def<text:s/><text:span text:style-name="T9">sistema_notas_turma</text:span>():</text:p>
      <text:p text:style-name="Normal">  total_alunos = int(input("Quantos alunos existem na turma?<text:s/><text:span text:style-name="T10">"))</text:span></text:p>
      <text:p text:style-name="P11"/>
      <text:p text:style-name="P12">  for j in range(1, total_alunos + 1):</text:p>
      <text:p text:style-name="Normal"><text:span text:style-name="T13">    </text:span>aluno_nome = input("Nome do aluno: ")</text:p>
      <text:p text:style-name="Normal">    <text:span text:style-name="T14">n1 = float(input("Nota 1: "))</text:span></text:p>
      <text:p text:style-name="P15">    n2 = float(input("Nota 2: "))</text:p>
      <text:p text:style-name="P16"/>
      <text:p text:style-name="Normal"><text:span text:style-name="T17">    </text:span>media_aluno = (n1 + n2) / 2</text:p>
      <text:p text:style-name="Normal"/>
      <text:p text:style-name="Normal">    if media_aluno &gt;= 7.0:</text:p>
      <text:p text:style-name="Normal">      print(f"{aluno_nome}: Aprovado com média {media_aluno:.1f}")</text:p>
      <text:p text:style-name="Normal">    elif media_aluno &gt;= 5.0:</text:p>
      <text:p text:style-name="Normal">      print(f"{aluno_nome}: Recuperação (Média: {media_aluno:.1f})")</text:p>
      <text:p text:style-name="Normal">    else:</text:p>
      <text:p text:style-name="Normal">      print(f"{aluno_nome}: Reprovado")</text:p>
      <text:p text:style-name="Normal"/>
      <text:p text:style-name="Normal">sistema_notas_turma()</text:p>
      <text:p text:style-name="Normal"/>
      <text:p text:style-name="Normal"/>
      <text:p text:style-name="Normal"/>
      <text:p text:style-name="Normal"/>
      <text:p text:style-name="Normal"/>
      <text:p text:style-name="Normal">def<text:s/><text:span text:style-name="T18">simulador_poupanca</text:span>():</text:p>
      <text:p text:style-name="Normal">  saldo = float(input("Valor inicial do investimento: "))</text:p>
      <text:p text:style-name="Normal">  taxa = float(input("Taxa de juros mensal (em %): "))</text:p>
      <text:p text:style-name="Normal">  meses = int(input("Número de meses da simulação: "))</text:p>
      <text:p text:style-name="Normal"/>
      <text:p text:style-name="Normal">  <text:span text:style-name="T19">for m in range(1, meses + 1):</text:span></text:p>
      <text:p text:style-name="Normal"><text:span text:style-name="T20">    </text:span>aporte = float(input(f"Quanto deseja depositar no mês {m}? (0 para nenhum) "))</text:p>
      <text:p text:style-name="Normal"/>
      <text:p text:style-name="Normal">    saldo += aporte</text:p>
      <text:p text:style-name="Normal">    juros = saldo * (taxa / 100)</text:p>
      <text:p text:style-name="Normal">    saldo += juros</text:p>
      <text:p text:style-name="Normal"/>
      <text:p text:style-name="Normal">    print(f"Mês {m}: Saldo atualizado = R${saldo:.2f}")</text:p>
      <text:p text:style-name="Normal"/>
      <text:p text:style-name="Normal">    <text:span text:style-name="T21">if saldo &gt; 10000.0:</text:span></text:p>
      <text:p text:style-name="Normal"><text:span text:style-name="T22">      print(f"Parabéns!<text:s/></text:span>Você atingiu a meta de 10k no mês {m}")</text:p>
      <text:p text:style-name="Normal"/>
      <text:p text:style-name="Normal">  print(f"Resultado final após {meses} meses: R${saldo:.2f}")</text:p>
      <text:p text:style-name="Normal"/>
      <text:p text:style-name="Normal">simulador_poupanca()</text:p>
      <text:p text:style-name="Normal"/>
      <text:p text:style-name="Normal"/>
      <text:p text:style-name="Normal"><text:span text:style-name="T23">Sobre Tipagem</text:span></text:p>
      <text:p text:style-name="Normal">A função input() em Python<text:s/><text:span text:style-name="T24">sempre retorna uma string</text:span>, independente do que o usuário digitar. Se você esquecer de converter com int() ou float(), qualquer operação matemática falhará com um TypeError. Por exemplo, tentar calcular preco * qtd onde preco é a string "10.5" gera um erro, pois Python não sabe<text:s/><text:soft-page-break/>multiplicar texto por número. Além disso, somar strings com + causa concatenação em vez de soma: "10" + "5" resulta em "105", não 15. Por isso, a conversão explícita é obrigatória sempre que se espera um valor numérico vindo do teclado.</text:p>
      <text:p text:style-name="Normal"><text:span text:style-name="T25">2. Sobre Estruturas</text:span></text:p>
      <text:p text:style-name="Normal">No pseudocódigo, PARA i DE 1 ATE 7 inclui o 7 (o limite é fechado). Em Python, range(início, fim) exclui o valor final — o limite é<text:s/><text:span text:style-name="T26">aberto à direita</text:span>. Por isso, para contar de 1 até meses incluindo o último, a sintaxe correta é:</text:p>
      <text:p text:style-name="Normal"/>
      <text:p text:style-name="Normal">range(1, meses +1)</text:p>
      <text:p text:style-name="Normal"/>
      <text:p text:style-name="Normal">Esse comportamento existe porque o Python segue uma convenção matemática de intervalos semiabertos [início, fim), o que facilita calcular o tamanho do intervalo (fim - início) e evita erros de "off-by-one" em listas e índices (onde o último índice válido já é len - 1). É uma escolha de design da linguagem para manter consistência com o acesso a sequência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NY ISABELLY SILVA SANTOS</meta:initial-creator>
    <dc:creator>ANNY ISABELLY SILVA SANTOS</dc:creator>
    <meta:creation-date>2026-05-14T23:28:00Z</meta:creation-date>
    <dc:date>2026-05-14T23:28:00Z</dc:date>
    <meta:template xlink:href="Normal" xlink:type="simple"/>
    <meta:editing-cycles>1</meta:editing-cycles>
    <meta:editing-duration>PT0S</meta:editing-duration>
    <meta:user-defined meta:name="MSIP_Label_defa4170-0d19-0005-0004-bc88714345d2_Enabled">true</meta:user-defined>
    <meta:user-defined meta:name="MSIP_Label_defa4170-0d19-0005-0004-bc88714345d2_SetDate">2026-05-14T23:28:50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38ae2f02-5710-4e12-80bb-83600c3fdf1e</meta:user-defined>
    <meta:user-defined meta:name="MSIP_Label_defa4170-0d19-0005-0004-bc88714345d2_ActionId">8ae08037-31f6-4871-b50d-83d0dbad410a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5" meta:paragraph-count="7" meta:word-count="591" meta:character-count="3781" meta:row-count="26" meta:non-whitespace-character-count="3197"/>
  </office:meta>
</office:document-meta>
</file>